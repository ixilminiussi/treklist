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2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ttings">
      <style:table-properties table:display="true" style:writing-mode="lr-tb"/>
    </style:style>
    <style:style style:name="ta2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a61c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e6b8af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34343" fo:background-color="#e6b8af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434343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34343" fo:background-color="#b7b7b7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ffe599" style:text-align-source="value-type" style:repeat-content="false" fo:wrap-option="no-wrap" fo:border-left="none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2cc" style:text-align-source="value-type" style:repeat-content="false" fo:wrap-option="no-wrap" fo:border-left="none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274e1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74e1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274e1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&quot;Arial&quot;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&quot;Arial&quot;" style:font-size-complex="15pt" style:font-style-complex="normal" style:font-weight-complex="normal"/>
    </style:style>
    <style:style style:name="ce30" style:family="table-cell" style:parent-style-name="Default">
      <style:table-cell-properties fo:border-bottom="0.74pt solid #274e13" style:diagonal-bl-tr="none" style:diagonal-tl-br="none" fo:border-left="none" fo:border-right="none" style:rotation-align="none" fo:border-top="0.74pt solid #274e1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274e13" style:diagonal-bl-tr="none" style:diagonal-tl-br="none" fo:border-left="none" fo:border-right="0.74pt solid #274e13" style:rotation-align="none" fo:border-top="0.74pt solid #274e1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274e13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274e1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fo:background-color="#cc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2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3" style:family="table-cell" style:parent-style-name="Default">
      <style:table-cell-properties fo:background-color="#bdbd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4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ale&quot;" style:apply-style-name="ConditionalStyle_5f_11" style:base-cell-address="Checklist.G7"/>
    </style:style>
    <style:style style:name="ce5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25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TRUE&quot;" style:apply-style-name="ConditionalStyle_5f_2" style:base-cell-address="Checklist.G128"/>
    </style:style>
    <style:style style:name="ce5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TRUE&quot;" style:apply-style-name="ConditionalStyle_5f_2" style:base-cell-address="Checklist.G128"/>
    </style:style>
    <style:style style:name="ce5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7" style:family="table-cell" style:parent-style-name="Default" style:data-style-name="N126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ale&quot;" style:apply-style-name="ConditionalStyle_5f_11" style:base-cell-address="Checklist.G7"/>
    </style:style>
    <style:style style:name="ce60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/>
    <style:style style:name="ce6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bold" style:font-weight-asian="bold" style:font-weight-complex="bold"/>
    </style:style>
    <style:style style:name="T3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/>
    </style:style>
    <style:style style:name="T4" style:family="text">
      <style:text-properties fo:text-shadow="none" style:font-size-complex="11pt" style:font-size-asian="11pt" style:font-name-complex="Arial" fo:color="#000000" style:text-position="0% 100%" style:text-outline="false" style:text-line-through-type="none" style:text-underline-style="none" style:text-underline-color="font-color" fo:font-size="11pt" style:font-name="Arial" fo:font-weight="normal" style:font-weight-asian="normal" style:font-weight-complex="normal" fo:font-style="italic" style:font-style-asian="italic" style:font-style-complex="italic"/>
    </style:style>
    <style:style style:name="T5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7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8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9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7f6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11" style:family="text">
      <style:text-properties style:font-weight-asian="bold" fo:font-style="normal" style:font-name-complex="&quot;Arial&quot;" style:font-size-asian="11pt" fo:color="#7f6000" style:font-style-complex="normal" style:font-name="&quot;Arial&quot;" style:font-style-asian="normal" style:font-weight-complex="bold" style:text-line-through-type="none" style:text-underline-style="none" style:text-underline-color="font-color" fo:font-weight="bold" fo:font-size="11pt" fo:text-shadow="none" style:text-position="0% 100%" style:text-outline="false" style:font-size-complex="11pt"/>
    </style:style>
    <style:style style:name="T12" style:family="text">
      <style:text-properties fo:font-style="normal" style:font-name-complex="&quot;Arial&quot;" style:font-size-asian="11pt" style:font-style-complex="normal" style:font-name="&quot;Arial&quot;" style:font-style-asian="normal" style:text-line-through-type="none" style:text-underline-style="none" style:text-underline-color="font-color" fo:font-size="11pt" fo:text-shadow="none" style:text-position="0% 100%" style:text-outline="false" style:font-size-complex="11pt" fo:font-weight="normal" style:font-weight-complex="normal" fo:color="#000000" style:font-weight-asian="normal"/>
    </style:style>
    <style:style style:name="T13" style:family="text">
      <style:text-properties style:font-name-complex="&quot;Arial&quot;" style:font-size-asian="11pt" style:font-name="&quot;Arial&quot;" style:text-line-through-type="none" style:text-underline-style="none" style:text-underline-color="font-color" fo:font-size="11pt" fo:text-shadow="none" style:text-position="0% 100%" style:text-outline="false" style:font-size-complex="11pt" fo:color="#000000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style:font-name-complex="&quot;Arial&quot;" style:font-size-asian="11pt" style:font-name="&quot;Arial&quot;" style:text-line-through-type="none" style:text-underline-style="none" style:text-underline-color="font-color" fo:font-size="11pt" fo:text-shadow="none" style:text-position="0% 100%" style:text-outline="false" style:font-size-complex="11pt" fo:color="#000000" fo:font-style="normal" fo:font-weight="normal" style:font-style-asian="normal" style:font-weight-complex="normal" style:font-weight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ke&quot;;&quot;Snow&quot;;&quot;Bikepacking&quot;)" table:allow-empty-cell="true" table:display-list="unsorted" table:base-cell-address="Settings.H8">
          <table:error-message table:message-type="stop" table:display="true"/>
        </table:content-validation>
        <table:content-validation table:name="val2" table:condition="of:cell-content-is-in-list(&quot;Refuges&quot;;&quot;Self-sustaining&quot;)" table:allow-empty-cell="true" table:display-list="unsorted" table:base-cell-address="Settings.H9">
          <table:error-message table:message-type="stop" table:display="true"/>
        </table:content-validation>
        <table:content-validation table:name="val3" table:condition="of:cell-content-is-in-list(&quot;Refuges&quot;;&quot;Tent&quot;;&quot;Hammock&quot;)" table:allow-empty-cell="true" table:display-list="unsorted" table:base-cell-address="Settings.H10">
          <table:error-message table:message-type="stop" table:display="true"/>
        </table:content-validation>
        <table:content-validation table:name="val4" table:condition="of:cell-content-is-in-list(&quot;Wet&quot;;&quot;Dry&quot;;&quot;Mixed&quot;)" table:allow-empty-cell="true" table:display-list="unsorted" table:base-cell-address="Settings.H11">
          <table:error-message table:message-type="stop" table:display="true"/>
        </table:content-validation>
        <table:content-validation table:name="val5" table:condition="of:cell-content-is-in-list(&quot;Cold&quot;;&quot;Warm&quot;;&quot;Mixed&quot;)" table:allow-empty-cell="true" table:display-list="unsorted" table:base-cell-address="Settings.H12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Checklist.H4">
          <table:error-message table:message-type="stop" table:display="true"/>
        </table:content-validation>
        <table:content-validation table:name="val7" table:condition="of:cell-content-is-in-list(&quot;Male&quot;;&quot;Female&quot;)" table:allow-empty-cell="true" table:display-list="unsorted" table:base-cell-address="Checklist.G7">
          <table:error-message table:message-type="stop" table:display="true"/>
        </table:content-validation>
      </table:content-validations>
      <table:table table:name="Settings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hecklist Settings</text:p>
          </table:table-cell>
          <table:covered-table-cell table:number-columns-repeated="8" table:style-name="ce12"/>
          <table:covered-table-cell table:style-name="ce1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5" table:number-rows-spanned="1">
            <text:p>Disclaimer</text:p>
          </table:table-cell>
          <table:covered-table-cell table:number-columns-repeated="3" table:style-name="ce12"/>
          <table:covered-table-cell table:style-name="ce16"/>
          <table:table-cell table:style-name="ce23" office:value-type="string" calcext:value-type="string" table:number-columns-spanned="5" table:number-rows-spanned="1">
            <text:p>How ?</text:p>
          </table:table-cell>
          <table:covered-table-cell table:number-columns-repeated="3" table:style-name="ce12"/>
          <table:covered-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2">
            <text:p><text:span text:style-name="T1">- This my </text:span><text:span text:style-name="T2">subjective</text:span><text:span text:style-name="T3"> idea of an exhaustive trekking checklist. From my experiences trekking, snow trekking, and bikepacking in France </text:span><text:span text:style-name="T4">(never in refuges)</text:span></text:p>
          </table:table-cell>
          <table:covered-table-cell table:number-columns-repeated="3"/>
          <table:covered-table-cell table:style-name="ce21"/>
          <table:table-cell table:style-name="ce24" office:value-type="string" calcext:value-type="string" table:number-columns-spanned="5" table:number-rows-spanned="1">
            <text:p><text:span text:style-name="T9">1.</text:span><text:span text:style-name="T10"> Select the appropriate settings on this page</text:span></text:p>
          </table:table-cell>
          <table:covered-table-cell table:number-columns-repeated="3"/>
          <table:covered-table-cell table:style-name="ce21"/>
          <table:table-cell table:number-columns-repeated="1014"/>
        </table:table-row>
        <table:table-row table:style-name="ro1">
          <table:covered-table-cell table:style-name="ce4"/>
          <table:covered-table-cell table:number-columns-repeated="3"/>
          <table:covered-table-cell table:style-name="ce21"/>
          <table:table-cell table:style-name="ce25" office:value-type="string" calcext:value-type="string" table:number-columns-spanned="5" table:number-rows-spanned="1">
            <text:p><text:span text:style-name="T11">2.</text:span><text:span text:style-name="T12"> Go to </text:span><text:span text:style-name="T13">Checklist Functions</text:span><text:span text:style-name="T14"> -&gt; </text:span><text:span text:style-name="T13">Apply Settings</text:span>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5" table:number-rows-spanned="2">
            <text:p><text:span text:style-name="T5">- Remember to check your local laws and regulations for </text:span><text:span text:style-name="T6">forbidden</text:span><text:span text:style-name="T7">, or </text:span><text:span text:style-name="T8">legally-required</text:span><text:span text:style-name="T7"> equipment to bring.</text:span></text:p>
          </table:table-cell>
          <table:covered-table-cell table:number-columns-repeated="3"/>
          <table:covered-table-cell table:style-name="ce21"/>
          <table:table-cell table:style-name="ce24" office:value-type="string" calcext:value-type="string" table:number-columns-spanned="5" table:number-rows-spanned="1">
            <text:p><text:span text:style-name="T9">3.</text:span><text:span text:style-name="T10"> On the checklist page, add as many participants and their corresponding information</text:span></text:p>
          </table:table-cell>
          <table:covered-table-cell table:number-columns-repeated="3"/>
          <table:covered-table-cell table:style-name="ce21"/>
          <table:table-cell table:number-columns-repeated="1014"/>
        </table:table-row>
        <table:table-row table:style-name="ro1">
          <table:covered-table-cell table:style-name="ce6"/>
          <table:covered-table-cell table:number-columns-repeated="3" table:style-name="ce13"/>
          <table:covered-table-cell table:style-name="ce22"/>
          <table:table-cell table:style-name="ce26" office:value-type="string" calcext:value-type="string" table:number-columns-spanned="5" table:number-rows-spanned="1">
            <text:p><text:span text:style-name="T9">4.</text:span><text:span text:style-name="T10"> Fill in the various items using the supported keywords</text:span></text:p>
          </table:table-cell>
          <table:covered-table-cell table:number-columns-repeated="3"/>
          <table:covered-table-cell table:style-name="ce21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5" table:number-rows-spanned="1">
            <text:p>Before you leave</text:p>
          </table:table-cell>
          <table:covered-table-cell table:number-columns-repeated="3" table:style-name="ce13"/>
          <table:covered-table-cell table:style-name="ce22"/>
          <table:table-cell table:style-name="ce27" office:value-type="string" calcext:value-type="string" table:number-columns-spanned="5" table:number-rows-spanned="1">
            <text:p>Checklist Settings</text:p>
          </table:table-cell>
          <table:covered-table-cell table:number-columns-repeated="3"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Do others know of your planned route ?</text:p>
          </table:table-cell>
          <table:covered-table-cell table:style-name="ce14"/>
          <table:covered-table-cell table:style-name="ce15"/>
          <table:table-cell table:style-name="ce17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28" office:value-type="string" calcext:value-type="string" table:number-columns-spanned="2" table:number-rows-spanned="1">
            <text:p>Trek type</text:p>
          </table:table-cell>
          <table:covered-table-cell table:style-name="ce31"/>
          <table:table-cell table:style-name="ce32" table:content-validation-name="val1" office:value-type="string" calcext:value-type="string" table:number-columns-spanned="3" table:number-rows-spanned="1">
            <text:p>Hike</text:p>
          </table:table-cell>
          <table:covered-table-cell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3" table:number-rows-spanned="1">
            <text:p>Do you know the local rescue number and process ?</text:p>
          </table:table-cell>
          <table:covered-table-cell table:style-name="ce14"/>
          <table:covered-table-cell table:style-name="ce15"/>
          <table:table-cell table:style-name="ce18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28" office:value-type="string" calcext:value-type="string" table:number-columns-spanned="2" table:number-rows-spanned="1">
            <text:p>Food source</text:p>
          </table:table-cell>
          <table:covered-table-cell table:style-name="ce31"/>
          <table:table-cell table:style-name="ce32" table:content-validation-name="val2" office:value-type="string" calcext:value-type="string" table:number-columns-spanned="3" table:number-rows-spanned="1">
            <text:p>Self-sustaining</text:p>
          </table:table-cell>
          <table:covered-table-cell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10" office:value-type="string" calcext:value-type="string" table:number-columns-spanned="3" table:number-rows-spanned="1">
            <text:p>Do you know local camping laws ?</text:p>
          </table:table-cell>
          <table:covered-table-cell table:style-name="ce12"/>
          <table:covered-table-cell table:style-name="ce16"/>
          <table:table-cell table:style-name="ce19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6"/>
          <table:table-cell table:style-name="ce28" office:value-type="string" calcext:value-type="string" table:number-columns-spanned="2" table:number-rows-spanned="1">
            <text:p>Camping preference</text:p>
          </table:table-cell>
          <table:covered-table-cell table:style-name="ce31"/>
          <table:table-cell table:style-name="ce32" table:content-validation-name="val3" office:value-type="string" calcext:value-type="string" table:number-columns-spanned="3" table:number-rows-spanned="1">
            <text:p>Tent</text:p>
          </table:table-cell>
          <table:covered-table-cell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Have you checked the weather day + nights ?</text:p>
          </table:table-cell>
          <table:covered-table-cell table:style-name="ce14"/>
          <table:covered-table-cell table:style-name="ce15"/>
          <table:table-cell table:style-name="ce20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28" office:value-type="string" calcext:value-type="string" table:number-columns-spanned="2" table:number-rows-spanned="1">
            <text:p>Expected weather</text:p>
          </table:table-cell>
          <table:covered-table-cell table:style-name="ce31"/>
          <table:table-cell table:style-name="ce32" table:content-validation-name="val4" office:value-type="string" calcext:value-type="string" table:number-columns-spanned="3" table:number-rows-spanned="1">
            <text:p>Mixed</text:p>
          </table:table-cell>
          <table:covered-table-cell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Have you packed all your belongings ? </text:p>
          </table:table-cell>
          <table:covered-table-cell table:style-name="ce14"/>
          <table:covered-table-cell table:style-name="ce15"/>
          <table:table-cell table:style-name="ce20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28" office:value-type="string" calcext:value-type="string" table:number-columns-spanned="2" table:number-rows-spanned="1">
            <text:p>Expected temperature</text:p>
          </table:table-cell>
          <table:covered-table-cell table:style-name="ce31"/>
          <table:table-cell table:style-name="ce33" table:content-validation-name="val5" office:value-type="string" calcext:value-type="string" table:number-columns-spanned="3" table:number-rows-spanned="1">
            <text:p>Mixed</text:p>
          </table:table-cell>
          <table:covered-table-cell table:style-name="ce30"/>
          <table:covered-table-cell table:style-name="ce31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Have you tested your material ?</text:p>
          </table:table-cell>
          <table:covered-table-cell table:style-name="ce14"/>
          <table:covered-table-cell table:style-name="ce15"/>
          <table:table-cell table:style-name="ce20" table:formula="of:=FALSE()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29" office:value-type="string" calcext:value-type="string" table:number-columns-spanned="5" table:number-rows-spanned="1">
            <text:p><text:a xlink:href="#Checklist.A1" xlink:type="simple">Go to Checklist  </text:a></text:p>
          </table:table-cell>
          <table:covered-table-cell table:number-columns-repeated="4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cklist" table:style-name="ta2">
        <table:table-column table:style-name="co3" table:visibility="collapse" table:number-columns-repeated="5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34" table:number-columns-repeated="5"/>
          <table:table-cell table:style-name="ce41" office:value-type="string" calcext:value-type="string" table:number-columns-spanned="27" table:number-rows-spanned="1">
            <text:p>Supported keywords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Example</text:p>
          </table:table-cell>
          <table:table-cell table:style-name="ce45"/>
          <table:table-cell table:style-name="ce45" office:value-type="string" calcext:value-type="string">
            <text:p>Got it</text:p>
          </table:table-cell>
          <table:table-cell table:style-name="ce45" office:value-type="string" calcext:value-type="string">
            <text:p>Provided</text:p>
          </table:table-cell>
          <table:table-cell table:style-name="ce45" office:value-type="string" calcext:value-type="string">
            <text:p>Shared</text:p>
          </table:table-cell>
          <table:table-cell table:style-name="ce45" office:value-type="string" calcext:value-type="string">
            <text:p>Will get</text:p>
          </table:table-cell>
          <table:table-cell table:style-name="ce45" office:value-type="string" calcext:value-type="string">
            <text:p>Need</text:p>
          </table:table-cell>
          <table:table-cell table:style-name="ce45" office:value-type="string" calcext:value-type="string">
            <text:p>don't need</text:p>
          </table:table-cell>
          <table:table-cell table:style-name="ce60" table:number-columns-spanned="19" table:number-rows-spanned="1"/>
          <table:covered-table-cell table:number-columns-repeated="18" table:style-name="ce61"/>
          <table:table-cell table:number-columns-repeated="992"/>
        </table:table-row>
        <table:table-row table:style-name="ro1">
          <table:table-cell table:style-name="ce36" table:number-columns-repeated="5"/>
          <table:table-cell table:style-name="ce36" office:value-type="string" calcext:value-type="string">
            <text:p>Trekkers</text:p>
          </table:table-cell>
          <table:table-cell table:style-name="ce36" table:number-columns-repeated="2"/>
          <table:table-cell table:style-name="ce56" table:number-columns-repeated="24"/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text:p>Weight (kg)</text:p>
          </table:table-cell>
          <table:table-cell table:style-name="ce46"/>
          <table:table-cell table:style-name="ce46" table:content-validation-name="val6" table:number-columns-repeated="25"/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text:p>Height (cm)</text:p>
          </table:table-cell>
          <table:table-cell table:style-name="ce47" table:content-validation-name="val6" table:number-columns-repeated="3"/>
          <table:table-cell table:style-name="ce57" table:content-validation-name="val6" table:number-columns-repeated="23"/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text:p>Age</text:p>
          </table:table-cell>
          <table:table-cell table:style-name="ce48" table:content-validation-name="val6" table:number-columns-repeated="3"/>
          <table:table-cell table:style-name="ce58" table:content-validation-name="val6" table:number-columns-repeated="23"/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text:p>Sex</text:p>
          </table:table-cell>
          <table:table-cell table:style-name="ce49" table:content-validation-name="val7" table:number-columns-repeated="3"/>
          <table:table-cell table:style-name="ce59" table:content-validation-name="val7" table:number-columns-repeated="23"/>
          <table:table-cell table:number-columns-repeated="992"/>
        </table:table-row>
        <table:table-row table:style-name="ro1">
          <table:table-cell table:style-name="ce34" table:number-columns-repeated="5"/>
          <table:table-cell table:style-name="ce41" office:value-type="string" calcext:value-type="string" table:number-columns-spanned="27" table:number-rows-spanned="1">
            <text:p>Suggestions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office:annotation draw:style-name="gr1" draw:text-style-name="P2" svg:width="280.6pt" svg:height="28.09pt" svg:x="113.33pt" svg:y="148.71pt" draw:caption-point-x="-11.54pt" draw:caption-point-y="-22.42pt">
              <dc:date>2026-04-27T00:00:00</dc:date>
              <text:p text:style-name="P1">Based on the Mifflin - St Jeor equation. With a 1.3 activity factor</text:p>
            </office:annotation>
            <text:p>Daily intake</text:p>
          </table:table-cell>
          <table:table-cell table:style-name="ce50" table:formula="of:=IFERROR(__xludf.dummyfunction(&quot;IF(OR(OR(OR(ISBLANK(G4), ISBLANK(G5)), ISBLANK(G6)), ISBLANK(G7)), &quot;&quot;&quot;&quot;, IF(REGEXMATCH(G7, &quot;&quot;Male&quot;&quot;), 10 * G4 + 6.25 * G5 - 5 * G6 + 5, 10 * G4 + 6.25 * G5 - 5 * G6 - 161) * 1.4)&quot;);&quot;&quot;)">
            <text:p/>
          </table:table-cell>
          <table:table-cell table:style-name="ce50" table:formula="of:=IFERROR(__xludf.dummyfunction(&quot;IF(OR(OR(OR(ISBLANK(H4), ISBLANK(H5)), ISBLANK(H6)), ISBLANK(H7)), &quot;&quot;&quot;&quot;, IF(REGEXMATCH(H7, &quot;&quot;Male&quot;&quot;), 10 * H4 + 6.25 * H5 - 5 * H6 + 5, 10 * H4 + 6.25 * H5 - 5 * H6 - 161) * 1.4)&quot;);&quot;&quot;)">
            <text:p/>
          </table:table-cell>
          <table:table-cell table:style-name="ce50" table:formula="of:=IFERROR(__xludf.dummyfunction(&quot;IF(OR(OR(OR(ISBLANK(I4), ISBLANK(I5)), ISBLANK(I6)), ISBLANK(I7)), &quot;&quot;&quot;&quot;, IF(REGEXMATCH(I7, &quot;&quot;Male&quot;&quot;), 10 * I4 + 6.25 * I5 - 5 * I6 + 5, 10 * I4 + 6.25 * I5 - 5 * I6 - 161) * 1.4)&quot;);&quot;&quot;)">
            <text:p/>
          </table:table-cell>
          <table:table-cell table:style-name="ce50" table:formula="of:=IFERROR(__xludf.dummyfunction(&quot;IF(OR(OR(OR(ISBLANK(J4), ISBLANK(J5)), ISBLANK(J6)), ISBLANK(J7)), &quot;&quot;&quot;&quot;, IF(REGEXMATCH(J7, &quot;&quot;Male&quot;&quot;), 10 * J4 + 6.25 * J5 - 5 * J6 + 5, 10 * J4 + 6.25 * J5 - 5 * J6 - 161) * 1.4)&quot;);&quot;&quot;)">
            <text:p/>
          </table:table-cell>
          <table:table-cell table:style-name="ce50" table:formula="of:=IFERROR(__xludf.dummyfunction(&quot;IF(OR(OR(OR(ISBLANK(K4), ISBLANK(K5)), ISBLANK(K6)), ISBLANK(K7)), &quot;&quot;&quot;&quot;, IF(REGEXMATCH(K7, &quot;&quot;Male&quot;&quot;), 10 * K4 + 6.25 * K5 - 5 * K6 + 5, 10 * K4 + 6.25 * K5 - 5 * K6 - 161) * 1.4)&quot;);&quot;&quot;)">
            <text:p/>
          </table:table-cell>
          <table:table-cell table:style-name="ce50" table:formula="of:=IFERROR(__xludf.dummyfunction(&quot;IF(OR(OR(OR(ISBLANK(L4), ISBLANK(L5)), ISBLANK(L6)), ISBLANK(L7)), &quot;&quot;&quot;&quot;, IF(REGEXMATCH(L7, &quot;&quot;Male&quot;&quot;), 10 * L4 + 6.25 * L5 - 5 * L6 + 5, 10 * L4 + 6.25 * L5 - 5 * L6 - 161) * 1.4)&quot;);&quot;&quot;)">
            <text:p/>
          </table:table-cell>
          <table:table-cell table:style-name="ce50" table:formula="of:=IFERROR(__xludf.dummyfunction(&quot;IF(OR(OR(OR(ISBLANK(M4), ISBLANK(M5)), ISBLANK(M6)), ISBLANK(M7)), &quot;&quot;&quot;&quot;, IF(REGEXMATCH(M7, &quot;&quot;Male&quot;&quot;), 10 * M4 + 6.25 * M5 - 5 * M6 + 5, 10 * M4 + 6.25 * M5 - 5 * M6 - 161) * 1.4)&quot;);&quot;&quot;)">
            <text:p/>
          </table:table-cell>
          <table:table-cell table:style-name="ce50" table:formula="of:=IFERROR(__xludf.dummyfunction(&quot;IF(OR(OR(OR(ISBLANK(N4), ISBLANK(N5)), ISBLANK(N6)), ISBLANK(N7)), &quot;&quot;&quot;&quot;, IF(REGEXMATCH(N7, &quot;&quot;Male&quot;&quot;), 10 * N4 + 6.25 * N5 - 5 * N6 + 5, 10 * N4 + 6.25 * N5 - 5 * N6 - 161) * 1.4)&quot;);&quot;&quot;)">
            <text:p/>
          </table:table-cell>
          <table:table-cell table:style-name="ce50" table:formula="of:=IFERROR(__xludf.dummyfunction(&quot;IF(OR(OR(OR(ISBLANK(O4), ISBLANK(O5)), ISBLANK(O6)), ISBLANK(O7)), &quot;&quot;&quot;&quot;, IF(REGEXMATCH(O7, &quot;&quot;Male&quot;&quot;), 10 * O4 + 6.25 * O5 - 5 * O6 + 5, 10 * O4 + 6.25 * O5 - 5 * O6 - 161) * 1.4)&quot;);&quot;&quot;)">
            <text:p/>
          </table:table-cell>
          <table:table-cell table:style-name="ce50" table:formula="of:=IFERROR(__xludf.dummyfunction(&quot;IF(OR(OR(OR(ISBLANK(P4), ISBLANK(P5)), ISBLANK(P6)), ISBLANK(P7)), &quot;&quot;&quot;&quot;, IF(REGEXMATCH(P7, &quot;&quot;Male&quot;&quot;), 10 * P4 + 6.25 * P5 - 5 * P6 + 5, 10 * P4 + 6.25 * P5 - 5 * P6 - 161) * 1.4)&quot;);&quot;&quot;)">
            <text:p/>
          </table:table-cell>
          <table:table-cell table:style-name="ce50" table:formula="of:=IFERROR(__xludf.dummyfunction(&quot;IF(OR(OR(OR(ISBLANK(Q4), ISBLANK(Q5)), ISBLANK(Q6)), ISBLANK(Q7)), &quot;&quot;&quot;&quot;, IF(REGEXMATCH(Q7, &quot;&quot;Male&quot;&quot;), 10 * Q4 + 6.25 * Q5 - 5 * Q6 + 5, 10 * Q4 + 6.25 * Q5 - 5 * Q6 - 161) * 1.4)&quot;);&quot;&quot;)">
            <text:p/>
          </table:table-cell>
          <table:table-cell table:style-name="ce50" table:formula="of:=IFERROR(__xludf.dummyfunction(&quot;IF(OR(OR(OR(ISBLANK(R4), ISBLANK(R5)), ISBLANK(R6)), ISBLANK(R7)), &quot;&quot;&quot;&quot;, IF(REGEXMATCH(R7, &quot;&quot;Male&quot;&quot;), 10 * R4 + 6.25 * R5 - 5 * R6 + 5, 10 * R4 + 6.25 * R5 - 5 * R6 - 161) * 1.4)&quot;);&quot;&quot;)">
            <text:p/>
          </table:table-cell>
          <table:table-cell table:style-name="ce50" table:formula="of:=IFERROR(__xludf.dummyfunction(&quot;IF(OR(OR(OR(ISBLANK(S4), ISBLANK(S5)), ISBLANK(S6)), ISBLANK(S7)), &quot;&quot;&quot;&quot;, IF(REGEXMATCH(S7, &quot;&quot;Male&quot;&quot;), 10 * S4 + 6.25 * S5 - 5 * S6 + 5, 10 * S4 + 6.25 * S5 - 5 * S6 - 161) * 1.4)&quot;);&quot;&quot;)">
            <text:p/>
          </table:table-cell>
          <table:table-cell table:style-name="ce50" table:formula="of:=IFERROR(__xludf.dummyfunction(&quot;IF(OR(OR(OR(ISBLANK(T4), ISBLANK(T5)), ISBLANK(T6)), ISBLANK(T7)), &quot;&quot;&quot;&quot;, IF(REGEXMATCH(T7, &quot;&quot;Male&quot;&quot;), 10 * T4 + 6.25 * T5 - 5 * T6 + 5, 10 * T4 + 6.25 * T5 - 5 * T6 - 161) * 1.4)&quot;);&quot;&quot;)">
            <text:p/>
          </table:table-cell>
          <table:table-cell table:style-name="ce50" table:formula="of:=IFERROR(__xludf.dummyfunction(&quot;IF(OR(OR(OR(ISBLANK(U4), ISBLANK(U5)), ISBLANK(U6)), ISBLANK(U7)), &quot;&quot;&quot;&quot;, IF(REGEXMATCH(U7, &quot;&quot;Male&quot;&quot;), 10 * U4 + 6.25 * U5 - 5 * U6 + 5, 10 * U4 + 6.25 * U5 - 5 * U6 - 161) * 1.4)&quot;);&quot;&quot;)">
            <text:p/>
          </table:table-cell>
          <table:table-cell table:style-name="ce50" table:formula="of:=IFERROR(__xludf.dummyfunction(&quot;IF(OR(OR(OR(ISBLANK(V4), ISBLANK(V5)), ISBLANK(V6)), ISBLANK(V7)), &quot;&quot;&quot;&quot;, IF(REGEXMATCH(V7, &quot;&quot;Male&quot;&quot;), 10 * V4 + 6.25 * V5 - 5 * V6 + 5, 10 * V4 + 6.25 * V5 - 5 * V6 - 161) * 1.4)&quot;);&quot;&quot;)">
            <text:p/>
          </table:table-cell>
          <table:table-cell table:style-name="ce50" table:formula="of:=IFERROR(__xludf.dummyfunction(&quot;IF(OR(OR(OR(ISBLANK(W4), ISBLANK(W5)), ISBLANK(W6)), ISBLANK(W7)), &quot;&quot;&quot;&quot;, IF(REGEXMATCH(W7, &quot;&quot;Male&quot;&quot;), 10 * W4 + 6.25 * W5 - 5 * W6 + 5, 10 * W4 + 6.25 * W5 - 5 * W6 - 161) * 1.4)&quot;);&quot;&quot;)">
            <text:p/>
          </table:table-cell>
          <table:table-cell table:style-name="ce50" table:formula="of:=IFERROR(__xludf.dummyfunction(&quot;IF(OR(OR(OR(ISBLANK(X4), ISBLANK(X5)), ISBLANK(X6)), ISBLANK(X7)), &quot;&quot;&quot;&quot;, IF(REGEXMATCH(X7, &quot;&quot;Male&quot;&quot;), 10 * X4 + 6.25 * X5 - 5 * X6 + 5, 10 * X4 + 6.25 * X5 - 5 * X6 - 161) * 1.4)&quot;);&quot;&quot;)">
            <text:p/>
          </table:table-cell>
          <table:table-cell table:style-name="ce50" table:formula="of:=IFERROR(__xludf.dummyfunction(&quot;IF(OR(OR(OR(ISBLANK(Y4), ISBLANK(Y5)), ISBLANK(Y6)), ISBLANK(Y7)), &quot;&quot;&quot;&quot;, IF(REGEXMATCH(Y7, &quot;&quot;Male&quot;&quot;), 10 * Y4 + 6.25 * Y5 - 5 * Y6 + 5, 10 * Y4 + 6.25 * Y5 - 5 * Y6 - 161) * 1.4)&quot;);&quot;&quot;)">
            <text:p/>
          </table:table-cell>
          <table:table-cell table:style-name="ce50" table:formula="of:=IFERROR(__xludf.dummyfunction(&quot;IF(OR(OR(OR(ISBLANK(Z4), ISBLANK(Z5)), ISBLANK(Z6)), ISBLANK(Z7)), &quot;&quot;&quot;&quot;, IF(REGEXMATCH(Z7, &quot;&quot;Male&quot;&quot;), 10 * Z4 + 6.25 * Z5 - 5 * Z6 + 5, 10 * Z4 + 6.25 * Z5 - 5 * Z6 - 161) * 1.4)&quot;);&quot;&quot;)">
            <text:p/>
          </table:table-cell>
          <table:table-cell table:style-name="ce50" table:formula="of:=IFERROR(__xludf.dummyfunction(&quot;IF(OR(OR(OR(ISBLANK(AA4), ISBLANK(AA5)), ISBLANK(AA6)), ISBLANK(AA7)), &quot;&quot;&quot;&quot;, IF(REGEXMATCH(AA7, &quot;&quot;Male&quot;&quot;), 10 * AA4 + 6.25 * AA5 - 5 * AA6 + 5, 10 * AA4 + 6.25 * AA5 - 5 * AA6 - 161) * 1.4)&quot;);&quot;&quot;)">
            <text:p/>
          </table:table-cell>
          <table:table-cell table:style-name="ce50" table:formula="of:=IFERROR(__xludf.dummyfunction(&quot;IF(OR(OR(OR(ISBLANK(AB4), ISBLANK(AB5)), ISBLANK(AB6)), ISBLANK(AB7)), &quot;&quot;&quot;&quot;, IF(REGEXMATCH(AB7, &quot;&quot;Male&quot;&quot;), 10 * AB4 + 6.25 * AB5 - 5 * AB6 + 5, 10 * AB4 + 6.25 * AB5 - 5 * AB6 - 161) * 1.4)&quot;);&quot;&quot;)">
            <text:p/>
          </table:table-cell>
          <table:table-cell table:style-name="ce50" table:formula="of:=IFERROR(__xludf.dummyfunction(&quot;IF(OR(OR(OR(ISBLANK(AC4), ISBLANK(AC5)), ISBLANK(AC6)), ISBLANK(AC7)), &quot;&quot;&quot;&quot;, IF(REGEXMATCH(AC7, &quot;&quot;Male&quot;&quot;), 10 * AC4 + 6.25 * AC5 - 5 * AC6 + 5, 10 * AC4 + 6.25 * AC5 - 5 * AC6 - 161) * 1.4)&quot;);&quot;&quot;)">
            <text:p/>
          </table:table-cell>
          <table:table-cell table:style-name="ce50" table:formula="of:=IFERROR(__xludf.dummyfunction(&quot;IF(OR(OR(OR(ISBLANK(AD4), ISBLANK(AD5)), ISBLANK(AD6)), ISBLANK(AD7)), &quot;&quot;&quot;&quot;, IF(REGEXMATCH(AD7, &quot;&quot;Male&quot;&quot;), 10 * AD4 + 6.25 * AD5 - 5 * AD6 + 5, 10 * AD4 + 6.25 * AD5 - 5 * AD6 - 161) * 1.4)&quot;);&quot;&quot;)">
            <text:p/>
          </table:table-cell>
          <table:table-cell table:style-name="ce50" table:formula="of:=IFERROR(__xludf.dummyfunction(&quot;IF(OR(OR(OR(ISBLANK(AE4), ISBLANK(AE5)), ISBLANK(AE6)), ISBLANK(AE7)), &quot;&quot;&quot;&quot;, IF(REGEXMATCH(AE7, &quot;&quot;Male&quot;&quot;), 10 * AE4 + 6.25 * AE5 - 5 * AE6 + 5, 10 * AE4 + 6.25 * AE5 - 5 * AE6 - 161) * 1.4)&quot;);&quot;&quot;)">
            <text:p/>
          </table:table-cell>
          <table:table-cell table:style-name="ce50" table:formula="of:=IFERROR(__xludf.dummyfunction(&quot;IF(OR(OR(OR(ISBLANK(AF4), ISBLANK(AF5)), ISBLANK(AF6)), ISBLANK(AF7)), &quot;&quot;&quot;&quot;, IF(REGEXMATCH(AF7, &quot;&quot;Male&quot;&quot;), 10 * AF4 + 6.25 * AF5 - 5 * AF6 + 5, 10 * AF4 + 6.25 * AF5 - 5 * AF6 - 161) * 1.4)&quot;);&quot;&quot;)">
            <text:p/>
          </table:table-cell>
          <table:table-cell table:number-columns-repeated="992"/>
        </table:table-row>
        <table:table-row table:style-name="ro1">
          <table:table-cell table:style-name="ce37" table:number-columns-repeated="5"/>
          <table:table-cell table:style-name="ce37" office:value-type="string" calcext:value-type="string">
            <text:p>Bag weight</text:p>
          </table:table-cell>
          <table:table-cell table:style-name="ce51" table:formula="of:=IF(ISBLANK([.G4]); &quot;&quot;; [.G4] * 0.2)">
            <text:p/>
          </table:table-cell>
          <table:table-cell table:style-name="ce51" table:formula="of:=IF(ISBLANK([.H4]); &quot;&quot;; [.H4] * 0.2)">
            <text:p/>
          </table:table-cell>
          <table:table-cell table:style-name="ce51" table:formula="of:=IF(ISBLANK([.I4]); &quot;&quot;; [.I4] * 0.2)">
            <text:p/>
          </table:table-cell>
          <table:table-cell table:style-name="ce51" table:formula="of:=IF(ISBLANK([.J4]); &quot;&quot;; [.J4] * 0.2)">
            <text:p/>
          </table:table-cell>
          <table:table-cell table:style-name="ce51" table:formula="of:=IF(ISBLANK([.K4]); &quot;&quot;; [.K4] * 0.2)">
            <text:p/>
          </table:table-cell>
          <table:table-cell table:style-name="ce51" table:formula="of:=IF(ISBLANK([.L4]); &quot;&quot;; [.L4] * 0.2)">
            <text:p/>
          </table:table-cell>
          <table:table-cell table:style-name="ce51" table:formula="of:=IF(ISBLANK([.M4]); &quot;&quot;; [.M4] * 0.2)">
            <text:p/>
          </table:table-cell>
          <table:table-cell table:style-name="ce51" table:formula="of:=IF(ISBLANK([.N4]); &quot;&quot;; [.N4] * 0.2)">
            <text:p/>
          </table:table-cell>
          <table:table-cell table:style-name="ce51" table:formula="of:=IF(ISBLANK([.O4]); &quot;&quot;; [.O4] * 0.2)">
            <text:p/>
          </table:table-cell>
          <table:table-cell table:style-name="ce51" table:formula="of:=IF(ISBLANK([.P4]); &quot;&quot;; [.P4] * 0.2)">
            <text:p/>
          </table:table-cell>
          <table:table-cell table:style-name="ce51" table:formula="of:=IF(ISBLANK([.Q4]); &quot;&quot;; [.Q4] * 0.2)">
            <text:p/>
          </table:table-cell>
          <table:table-cell table:style-name="ce51" table:formula="of:=IF(ISBLANK([.R4]); &quot;&quot;; [.R4] * 0.2)">
            <text:p/>
          </table:table-cell>
          <table:table-cell table:style-name="ce51" table:formula="of:=IF(ISBLANK([.S4]); &quot;&quot;; [.S4] * 0.2)">
            <text:p/>
          </table:table-cell>
          <table:table-cell table:style-name="ce51" table:formula="of:=IF(ISBLANK([.T4]); &quot;&quot;; [.T4] * 0.2)">
            <text:p/>
          </table:table-cell>
          <table:table-cell table:style-name="ce51" table:formula="of:=IF(ISBLANK([.U4]); &quot;&quot;; [.U4] * 0.2)">
            <text:p/>
          </table:table-cell>
          <table:table-cell table:style-name="ce51" table:formula="of:=IF(ISBLANK([.V4]); &quot;&quot;; [.V4] * 0.2)">
            <text:p/>
          </table:table-cell>
          <table:table-cell table:style-name="ce51" table:formula="of:=IF(ISBLANK([.W4]); &quot;&quot;; [.W4] * 0.2)">
            <text:p/>
          </table:table-cell>
          <table:table-cell table:style-name="ce51" table:formula="of:=IF(ISBLANK([.X4]); &quot;&quot;; [.X4] * 0.2)">
            <text:p/>
          </table:table-cell>
          <table:table-cell table:style-name="ce51" table:formula="of:=IF(ISBLANK([.Y4]); &quot;&quot;; [.Y4] * 0.2)">
            <text:p/>
          </table:table-cell>
          <table:table-cell table:style-name="ce51" table:formula="of:=IF(ISBLANK([.Z4]); &quot;&quot;; [.Z4] * 0.2)">
            <text:p/>
          </table:table-cell>
          <table:table-cell table:style-name="ce51" table:formula="of:=IF(ISBLANK([.AA4]); &quot;&quot;; [.AA4] * 0.2)">
            <text:p/>
          </table:table-cell>
          <table:table-cell table:style-name="ce51" table:formula="of:=IF(ISBLANK([.AB4]); &quot;&quot;; [.AB4] * 0.2)">
            <text:p/>
          </table:table-cell>
          <table:table-cell table:style-name="ce51" table:formula="of:=IF(ISBLANK([.AC4]); &quot;&quot;; [.AC4] * 0.2)">
            <text:p/>
          </table:table-cell>
          <table:table-cell table:style-name="ce51" table:formula="of:=IF(ISBLANK([.AD4]); &quot;&quot;; [.AD4] * 0.2)">
            <text:p/>
          </table:table-cell>
          <table:table-cell table:style-name="ce51" table:formula="of:=IF(ISBLANK([.AE4]); &quot;&quot;; [.AE4] * 0.2)">
            <text:p/>
          </table:table-cell>
          <table:table-cell table:style-name="ce51" table:formula="of:=IF(ISBLANK([.AF4]); &quot;&quot;; [.AF4] * 0.2)">
            <text:p/>
          </table:table-cell>
          <table:table-cell table:number-columns-repeated="992"/>
        </table:table-row>
        <table:table-row table:style-name="ro1">
          <table:table-cell table:style-name="ce38" office:value-type="string" calcext:value-type="string">
            <text:p>Trek</text:p>
          </table:table-cell>
          <table:table-cell table:style-name="ce38" office:value-type="string" calcext:value-type="string">
            <text:p>Food</text:p>
          </table:table-cell>
          <table:table-cell table:style-name="ce38" office:value-type="string" calcext:value-type="string">
            <text:p>Camping</text:p>
          </table:table-cell>
          <table:table-cell table:style-name="ce38" office:value-type="string" calcext:value-type="string">
            <text:p>Weather</text:p>
          </table:table-cell>
          <table:table-cell table:style-name="ce38" office:value-type="string" calcext:value-type="string">
            <text:p>Temp</text:p>
          </table:table-cell>
          <table:table-cell table:style-name="ce42" office:value-type="string" calcext:value-type="string" table:number-columns-spanned="27" table:number-rows-spanned="1">
            <text:p>Equipment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Camp</text:p>
          </table:table-cell>
          <table:covered-table-cell table:number-columns-repeated="26"/>
          <table:table-cell table:number-columns-repeated="992"/>
        </table:table-row>
        <table:table-row table:style-name="ro1" table:visibility="collapse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Tent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Tent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Tent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Survival Blanke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leeping pad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leeping bag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Liner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Mattres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Hammock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Hammock</text:p>
          </table:table-cell>
          <table:table-cell table:style-name="ce53" table:number-columns-repeated="26"/>
          <table:table-cell table:number-columns-repeated="992"/>
        </table:table-row>
        <table:table-row table:style-name="ro1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Hammock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Underquil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Hammock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Tarp</text:p>
          </table:table-cell>
          <table:table-cell table:style-name="ce53" table:number-columns-repeated="26"/>
          <table:table-cell table:number-columns-repeated="992"/>
        </table:table-row>
        <table:table-row table:style-name="ro1"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Hammock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Mosquito ne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style-name="ce39" office:value-type="string" calcext:value-type="string">
            <text:p>Snow Hike</text:p>
          </table:table-cell>
          <table:table-cell table:number-columns-repeated="4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Packing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style-name="ce40" office:value-type="string" calcext:value-type="string">
            <text:p>Snow Hike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ackpack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 Hike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Wet Mixed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Waterproof cover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style-name="ce40" office:value-type="string" calcext:value-type="string">
            <text:p>Snow Hike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amel bag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style-name="ce40" office:value-type="string" calcext:value-type="string">
            <text:p>Snow Hike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Trekking poles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39" office:value-type="string" calcext:value-type="string">
            <text:p>Snow</text:p>
          </table:table-cell>
          <table:table-cell table:number-columns-repeated="4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Snow</text:p>
          </table:table-cell>
          <table:covered-table-cell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hovel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earch beacon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earch rod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now shoe / Ski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ledge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39" office:value-type="string" calcext:value-type="string">
            <text:p>Bikepacking</text:p>
          </table:table-cell>
          <table:table-cell table:number-columns-repeated="4" table:style-name="ce39" office:value-type="string" calcext:value-type="string">
            <text:p>_</text:p>
          </table:table-cell>
          <table:table-cell table:style-name="ce44" office:value-type="string" calcext:value-type="string" table:number-columns-spanned="27" table:number-rows-spanned="1">
            <text:p>Bike</text:p>
          </table:table-cell>
          <table:covered-table-cell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</text:p>
          </table:table-cell>
          <table:table-cell table:style-name="ce53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lamps</text:p>
          </table:table-cell>
          <table:table-cell table:style-name="ce53" table:number-columns-repeated="26"/>
          <table:table-cell table:number-columns-repeated="992"/>
        </table:table-row>
        <table:table-row table:style-name="ro2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lock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packs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Wet Mixed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Waterproof cover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pack holder</text:p>
          </table:table-cell>
          <table:table-cell table:style-name="ce53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Clothing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Underwear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Base layer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Insulating layer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short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trong layer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Visibility ves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Wind/rain layer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Wet Mixed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Poncho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ap/hat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Helme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Dry Mixed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unglasses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ki goggl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Neck gater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Glov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Beanie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style-name="ce40" office:value-type="string" calcext:value-type="string">
            <text:p>Hike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Hiking shoes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2" table:style-name="ce40" office:value-type="string" calcext:value-type="string">
            <text:p>_</text:p>
          </table:table-cell>
          <table:table-cell table:style-name="ce40" office:value-type="string" calcext:value-type="string">
            <text:p>Wet</text:p>
          </table:table-cell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Ankle Gaters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Snow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Snow boots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shoe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Waiting sho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Pyjama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Warm sock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Health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Toothbrush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Toothpaste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Lipbalm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Tissu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Personal medication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Hand sanitizer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Wippie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Resealable bag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Dry Mixed</text:p>
          </table:table-cell>
          <table:table-cell table:style-name="ce40" office:value-type="string" calcext:value-type="string">
            <text:p>Sunscreen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Dry Mixed</text:p>
          </table:table-cell>
          <table:table-cell table:style-name="ce40" office:value-type="string" calcext:value-type="string">
            <text:p>Mosquito spray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Towel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Trash bag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First aid kit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Blister dressing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Hand/toe warmer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Food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Water containers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Lyophilised food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High energy snack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Drink mix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Cold Mixed</text:p>
          </table:table-cell>
          <table:table-cell table:style-name="ce40" office:value-type="string" calcext:value-type="string">
            <text:p>Insulated bottle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Cutlery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Knife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Camping stove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Stove charges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Lighter / matches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_</text:p>
          </table:table-cell>
          <table:table-cell table:style-name="ce40" office:value-type="string" calcext:value-type="string">
            <text:p>Self-sustaining</text:p>
          </table:table-cell>
          <table:table-cell table:number-columns-repeated="3" table:style-name="ce40" office:value-type="string" calcext:value-type="string">
            <text:p>_</text:p>
          </table:table-cell>
          <table:table-cell table:style-name="ce40" office:value-type="string" calcext:value-type="string">
            <text:p>Water filter / pastil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Fixer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Duct tape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wiss army knife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Rope</text:p>
          </table:table-cell>
          <table:table-cell table:style-name="ce52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ike pump</text:p>
          </table:table-cell>
          <table:table-cell table:style-name="ce45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Tire repair kit</text:p>
          </table:table-cell>
          <table:table-cell table:style-name="ce53" table:number-columns-repeated="26"/>
          <table:table-cell table:number-columns-repeated="992"/>
        </table:table-row>
        <table:table-row table:style-name="ro1" table:visibility="collapse">
          <table:table-cell table:style-name="ce40" office:value-type="string" calcext:value-type="string">
            <text:p>Bikepacking</text:p>
          </table:table-cell>
          <table:table-cell table:number-columns-repeated="4" table:style-name="ce40" office:value-type="string" calcext:value-type="string">
            <text:p>_</text:p>
          </table:table-cell>
          <table:table-cell table:style-name="ce40" office:value-type="string" calcext:value-type="string">
            <text:p>Bungee cord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Tech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Phone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External battery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olar battery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harging cabl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Offline maps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GPX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Itinerary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Guide book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Headlight</text:p>
          </table:table-cell>
          <table:table-cell table:style-name="ce52" table:number-columns-repeated="9"/>
          <table:table-cell table:style-name="ce62" table:number-columns-repeated="2"/>
          <table:table-cell table:style-name="ce52" table:number-columns-repeated="15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Lamp</text:p>
          </table:table-cell>
          <table:table-cell table:style-name="ce45" table:number-columns-repeated="9"/>
          <table:table-cell table:style-name="ce63" table:number-columns-repeated="2"/>
          <table:table-cell table:style-name="ce45" table:number-columns-repeated="15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ompass</text:p>
          </table:table-cell>
          <table:table-cell table:style-name="ce52" table:number-columns-repeated="9"/>
          <table:table-cell table:style-name="ce62" table:number-columns-repeated="2"/>
          <table:table-cell table:style-name="ce52" table:number-columns-repeated="15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Whistle</text:p>
          </table:table-cell>
          <table:table-cell table:style-name="ce45" table:number-columns-repeated="9"/>
          <table:table-cell table:style-name="ce63" table:number-columns-repeated="2"/>
          <table:table-cell table:style-name="ce45" table:number-columns-repeated="15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Watch</text:p>
          </table:table-cell>
          <table:table-cell table:style-name="ce52" table:number-columns-repeated="9"/>
          <table:table-cell table:style-name="ce62" table:number-columns-repeated="2"/>
          <table:table-cell table:style-name="ce52" table:number-columns-repeated="15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Wallet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ID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Insurance card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redit card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ash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Entertainment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Book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ard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Journal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Earbud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Offline songs/podcast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Camera + batteries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D Card</text:p>
          </table:table-cell>
          <table:table-cell table:style-name="ce52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 office:value-type="string" calcext:value-type="string">
            <text:p>Swimsuit</text:p>
          </table:table-cell>
          <table:table-cell table:style-name="ce45" table:number-columns-repeated="26"/>
          <table:table-cell table:number-columns-repeated="992"/>
        </table:table-row>
        <table:table-row table:style-name="ro1">
          <table:table-cell table:number-columns-repeated="5" table:style-name="ce39" office:value-type="string" calcext:value-type="string">
            <text:p>_</text:p>
          </table:table-cell>
          <table:table-cell table:style-name="ce43" office:value-type="string" calcext:value-type="string" table:number-columns-spanned="27" table:number-rows-spanned="1">
            <text:p>Custom (Add any items you feel are missing)</text:p>
          </table:table-cell>
          <table:covered-table-cell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4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4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4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5" table:number-columns-repeated="26"/>
          <table:table-cell table:number-columns-repeated="992"/>
        </table:table-row>
        <table:table-row table:style-name="ro1">
          <table:table-cell table:number-columns-repeated="5" table:style-name="ce40" office:value-type="string" calcext:value-type="string">
            <text:p>_</text:p>
          </table:table-cell>
          <table:table-cell table:style-name="ce40"/>
          <table:table-cell table:style-name="ce52" table:number-columns-repeated="26"/>
          <table:table-cell table:number-columns-repeated="992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hecklist.G128:Checklist.AF133">
            <calcext:condition calcext:apply-style-name="ConditionalStyle_2" calcext:value="=&quot;TRUE&quot;" calcext:base-cell-address="Checklist.G128"/>
          </calcext:conditional-format>
          <calcext:conditional-format calcext:target-range-address="Checklist.G128:Checklist.AF133">
            <calcext:condition calcext:apply-style-name="ConditionalStyle_3" calcext:value="=&quot;FALSE&quot;" calcext:base-cell-address="Checklist.G128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4" calcext:value="contains-text(&quot;Packed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5" calcext:value="contains-text(&quot;Shared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6" calcext:value="contains-text(&quot;Provided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7" calcext:value="contains-text(&quot;Got it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8" calcext:value="contains-text(&quot;Will get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9" calcext:value="contains-text(&quot;Don't&quot;)" calcext:base-cell-address="Checklist.A2"/>
          </calcext:conditional-format>
          <calcext:conditional-format calcext:target-range-address="Checklist.A2:Checklist.AF2 Checklist.G13:Checklist.AF22 Checklist.G24:Checklist.AF27 Checklist.G29:Checklist.AF33 Checklist.G35:Checklist.AF40 Checklist.G42:Checklist.AF63 Checklist.G65:Checklist.AF79 Checklist.G81:Checklist.AF91 Checklist.G93:Checklist.AF98 Checklist.G100:Checklist.AF112 Checklist.G114:Checklist.AF117 Checklist.G119:Checklist.AF126 Checklist.G128:Checklist.AF134">
            <calcext:condition calcext:apply-style-name="ConditionalStyle_10" calcext:value="contains-text(&quot;Need&quot;)" calcext:base-cell-address="Checklist.A2"/>
          </calcext:conditional-format>
          <calcext:conditional-format calcext:target-range-address="Checklist.G7:Checklist.AF7">
            <calcext:condition calcext:apply-style-name="ConditionalStyle_11" calcext:value="=&quot;Male&quot;" calcext:base-cell-address="Checklist.G7"/>
          </calcext:conditional-format>
          <calcext:conditional-format calcext:target-range-address="Checklist.G7:Checklist.AF7">
            <calcext:condition calcext:apply-style-name="ConditionalStyle_12" calcext:value="=&quot;Female&quot;" calcext:base-cell-address="Checklist.G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1" loext:min-decimal-places="1" number:min-integer-digits="1" number:grouping="true"/>
      <number:text> </number:text>
      <number:currency-symbol number:language="ar">kg</number:currency-symbol>
    </number:currency-style>
    <number:currency-style style:name="N126">
      <number:number number:decimal-places="0" loext:min-decimal-places="0" number:min-integer-digits="0" number:grouping="true"/>
      <number:text> </number:text>
      <number:currency-symbol number:language="ar">cm</number:currency-symbol>
    </number:currency-style>
    <number:currency-style style:name="N127">
      <number:number number:decimal-places="0" loext:min-decimal-places="0" number:min-integer-digits="1" number:grouping="true"/>
      <number:text> </number:text>
      <number:currency-symbol number:language="ar">kcal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999999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93c47d"/>
      <style:text-properties fo:color="#274e13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b4a7d6"/>
      <style:text-properties fo:color="#20124d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a4c2f4"/>
      <style:text-properties fo:color="#1c4587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d9ead3"/>
      <style:text-properties fo:color="#274e13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cc4125"/>
      <style:text-properties fo:color="#ffffff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d9d9d9"/>
      <style:text-properties fo:color="#b7b7b7" fo:font-style="italic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ffd966"/>
      <style:text-properties fo:color="#7f6000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cfe2f3"/>
    </style:style>
    <style:style style:name="ConditionalStyle_5f_12" style:display-name="ConditionalStyle_12" style:family="table-cell" style:parent-style-name="Default">
      <style:table-cell-properties fo:background-color="#d9d2e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39" meta:object-count="0"/>
    <meta:generator>LibreOfficeDev/6.0.5.2$Linux_X86_64 LibreOffice_project/</meta:generator>
  </office:meta>
</office:document-meta>
</file>